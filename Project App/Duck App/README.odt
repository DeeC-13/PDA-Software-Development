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 style:list-style-name="L11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 style:list-style-name="L15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 style:list-style-name="L16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 style:list-style-name="L18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 style:list-style-name="L14">
      <style:paragraph-properties fo:line-height="100%"/>
    </style:style>
    <style:style style:name="P8" style:family="paragraph" style:parent-style-name="Text_20_body" style:list-style-name="L17">
      <style:paragraph-properties fo:line-height="100%"/>
    </style:style>
    <style:style style:name="P9" style:family="paragraph" style:parent-style-name="Text_20_body" style:list-style-name="L13">
      <style:paragraph-properties fo:line-height="100%"/>
    </style:style>
    <style:style style:name="P10" style:family="paragraph" style:parent-style-name="Text_20_body" style:list-style-name="L22">
      <style:paragraph-properties fo:line-height="100%"/>
    </style:style>
    <style:style style:name="P11" style:family="paragraph" style:parent-style-name="Text_20_body" style:list-style-name="L11">
      <style:paragraph-properties fo:margin-top="0cm" fo:margin-bottom="0cm"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 style:list-style-name="L13">
      <style:paragraph-properties fo:margin-top="0cm" fo:margin-bottom="0cm"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 style:list-style-name="L15">
      <style:paragraph-properties fo:margin-top="0cm" fo:margin-bottom="0cm"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 style:list-style-name="L16">
      <style:paragraph-properties fo:margin-top="0cm" fo:margin-bottom="0cm"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 style:list-style-name="L17">
      <style:paragraph-properties fo:margin-top="0cm" fo:margin-bottom="0cm"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list-style-name="L12">
      <style:paragraph-properties fo:margin-top="0cm" fo:margin-bottom="0cm" fo:line-height="100%"/>
    </style:style>
    <style:style style:name="P17" style:family="paragraph" style:parent-style-name="Text_20_body" style:list-style-name="L14">
      <style:paragraph-properties fo:margin-top="0cm" fo:margin-bottom="0cm" fo:line-height="100%"/>
    </style:style>
    <style:style style:name="P18" style:family="paragraph" style:parent-style-name="Text_20_body" style:list-style-name="L15">
      <style:paragraph-properties fo:margin-top="0cm" fo:margin-bottom="0cm" fo:line-height="100%"/>
    </style:style>
    <style:style style:name="P19" style:family="paragraph" style:parent-style-name="Text_20_body" style:list-style-name="L17">
      <style:paragraph-properties fo:margin-top="0cm" fo:margin-bottom="0cm" fo:line-height="100%"/>
    </style:style>
    <style:style style:name="P20" style:family="paragraph" style:parent-style-name="Text_20_body" style:list-style-name="L18">
      <style:paragraph-properties fo:margin-top="0cm" fo:margin-bottom="0cm" fo:line-height="100%"/>
    </style:style>
    <style:style style:name="P21" style:family="paragraph" style:parent-style-name="Text_20_body" style:list-style-name="L22">
      <style:paragraph-properties fo:margin-top="0cm" fo:margin-bottom="0cm" fo:line-height="100%"/>
    </style:style>
    <style:style style:name="P22" style:family="paragraph" style:parent-style-name="Horizontal_20_Line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23" style:family="paragraph" style:parent-style-name="Heading_20_2">
      <style:paragraph-properties fo:line-height="100%"/>
      <style:text-properties style:font-name="Tahom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top="0cm" fo:margin-bottom="0.499cm" fo:line-height="100%"/>
    </style:style>
    <style:style style:name="P25" style:family="paragraph" style:parent-style-name="Heading_20_1">
      <style:paragraph-properties fo:line-height="100%"/>
      <style:text-properties style:font-name="Tahoma" fo:font-size="14pt" style:font-size-asian="14pt" style:font-size-complex="14pt"/>
    </style:style>
    <style:style style:name="T1" style:family="text">
      <style:text-properties style:font-name="Tahoma" fo:font-size="11pt" style:font-size-asian="11pt" style:font-size-complex="11pt"/>
    </style:style>
    <style:style style:name="T2" style:family="text">
      <style:text-properties style:font-name="Tahom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Tahoma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README</text:h>
      <text:h text:style-name="P25" text:outline-level="1">Give the Duck a Qwacker <text:s/></text:h>
      <text:h text:style-name="P23" text:outline-level="2">1. Overview</text:h>
      <text:p text:style-name="P6"><text:span text:style-name="Strong_20_Emphasis"><text:span text:style-name="T2">Give the Duck a Qwacker</text:span></text:span><text:span text:style-name="T1"> is designed as a quiz game. The player answers questions to feed a duck and get him home to his pond. Correct answers increase the score, move and feed the duck. Wrong answers keeps the duck where he is. The game has a timer and keeps track of player times and scores in a leaderboard.</text:span></text:p>
      <text:h text:style-name="P23" text:outline-level="2">2. Requirements</text:h>
      <text:list xml:id="list1371136296832666737" text:style-name="L11">
        <text:list-item>
          <text:p text:style-name="P11">Python 3.x installed </text:p>
        </text:list-item>
        <text:list-item>
          <text:p text:style-name="P11">Tkinter library (usually comes with Python) </text:p>
        </text:list-item>
        <text:list-item>
          <text:p text:style-name="P11">PIL (Pillow) library for images (install may be required)</text:p>
        </text:list-item>
        <text:list-item>
          <text:p text:style-name="P2">pyglet library for sounds (install may be required)</text:p>
        </text:list-item>
      </text:list>
      <text:h text:style-name="P23" text:outline-level="2">3. How to Run the Game</text:h>
      <text:list xml:id="list7475708394474074176" text:style-name="L13">
        <text:list-item>
          <text:p text:style-name="P12">Open a terminal or command prompt. </text:p>
        </text:list-item>
        <text:list-item>
          <text:p text:style-name="P12">Navigate to the project folder. </text:p>
        </text:list-item>
        <text:list-item>
          <text:p text:style-name="P9"><text:span text:style-name="T2">Run the main program: </text:span><text:span text:style-name="Source_20_Text"><text:span text:style-name="T2">python main.py</text:span></text:span></text:p>
        </text:list-item>
      </text:list>
      <text:list xml:id="list8137707690918444926" text:style-name="L14">
        <text:list-item>
          <text:p text:style-name="P17"><text:span text:style-name="T2">The </text:span><text:span text:style-name="Strong_20_Emphasis"><text:span text:style-name="T2">Welcome Screen</text:span></text:span><text:span text:style-name="T2"> will appear with options: </text:span></text:p>
          <text:list>
            <text:list-item>
              <text:p text:style-name="P17"><text:span text:style-name="Strong_20_Emphasis"><text:span text:style-name="T2">Start Game</text:span></text:span><text:span text:style-name="T2"> – begins the quiz </text:span></text:p>
            </text:list-item>
            <text:list-item>
              <text:p text:style-name="P17"><text:span text:style-name="Strong_20_Emphasis"><text:span text:style-name="T2">Instructions</text:span></text:span><text:span text:style-name="T2"> – shows game instructions </text:span></text:p>
            </text:list-item>
            <text:list-item>
              <text:p text:style-name="P17"><text:span text:style-name="Strong_20_Emphasis"><text:span text:style-name="T2">Leaderboard</text:span></text:span><text:span text:style-name="T2"> – displays top scores </text:span></text:p>
            </text:list-item>
            <text:list-item>
              <text:p text:style-name="P7"><text:span text:style-name="Strong_20_Emphasis"><text:span text:style-name="T2">Quit</text:span></text:span><text:span text:style-name="T2"> – exits the program </text:span></text:p>
            </text:list-item>
          </text:list>
        </text:list-item>
      </text:list>
      <text:h text:style-name="P23" text:outline-level="2">4. Gameplay Instructions</text:h>
      <text:list xml:id="list7635050343856310631" text:style-name="L15">
        <text:list-item>
          <text:p text:style-name="P18"><text:span text:style-name="T2">Answer </text:span><text:span text:style-name="Strong_20_Emphasis"><text:span text:style-name="T2">10 questions</text:span></text:span><text:span text:style-name="T2"> correctly to feed your duck to the pond. </text:span></text:p>
        </text:list-item>
        <text:list-item>
          <text:p text:style-name="P13">Each correct answer increases your score by 1. </text:p>
        </text:list-item>
        <text:list-item>
          <text:p text:style-name="P13">Duck is fed when you answer correctly. </text:p>
        </text:list-item>
        <text:list-item>
          <text:p text:style-name="P13">Wrong answers do not move the duck. </text:p>
        </text:list-item>
        <text:list-item>
          <text:p text:style-name="P13">Time is limited — countdown displayed on screen. </text:p>
        </text:list-item>
        <text:list-item>
          <text:p text:style-name="P3">After the game ends, you can enter your name to save your score to the leaderboard. </text:p>
        </text:list-item>
      </text:list>
      <text:h text:style-name="P23" text:outline-level="2">5. Notes / Troubleshooting</text:h>
      <text:list xml:id="list2103680030550762659" text:style-name="L22">
        <text:list-item>
          <text:p text:style-name="P21"><text:span text:style-name="T2">Make sure all </text:span><text:span text:style-name="Strong_20_Emphasis"><text:span text:style-name="T2">images and sound files</text:span></text:span><text:span text:style-name="T2"> are in the correct folders. </text:span></text:p>
        </text:list-item>
        <text:list-item>
          <text:p text:style-name="P21"><text:span text:style-name="T2">If Python cannot find </text:span><text:span text:style-name="Source_20_Text"><text:span text:style-name="T2">tkinter</text:span></text:span><text:span text:style-name="T2">, install it using: </text:span><text:bookmark text:name="code-block-viewer1"/><text:span text:style-name="Source_20_Text"><text:span text:style-name="T2">pip install tk <text:s text:c="2"/></text:span></text:span></text:p>
        </text:list-item>
        <text:list-item>
          <text:p text:style-name="P21"><text:span text:style-name="T2">If pyglet is missing, install it using: </text:span><text:bookmark text:name="code-block-viewer21"/><text:span text:style-name="Source_20_Text"><text:span text:style-name="T2">pip install pyglet</text:span></text:span></text:p>
        </text:list-item>
        <text:list-item>
          <text:p text:style-name="P10"><text:span text:style-name="T2">If Pillow is missing, install it using: </text:span><text:bookmark text:name="code-block-viewer11"/><text:span text:style-name="Source_20_Text"><text:span text:style-name="T2">pip install pillow</text:span></text:span></text:p>
          <text:p text:style-name="P10"><text:span text:style-name="Source_20_Text"><text:span text:style-name="T2"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5-06T08:08:51.59</meta:creation-date>
    <meta:document-statistic meta:table-count="0" meta:image-count="0" meta:object-count="0" meta:page-count="1" meta:paragraph-count="30" meta:word-count="276" meta:character-count="1475"/>
    <dc:date>2026-05-08T10:08:24.16</dc:date>
    <dc:creator>Dee </dc:creator>
    <meta:editing-duration>PT4M21S</meta:editing-duration>
    <meta:editing-cycles>1</meta:editing-cycles>
    <meta:generator>OpenOffice/4.1.15$Win32 OpenOffice.org_project/4115m2$Build-9813</meta:generator>
  </office:meta>
</office:document-meta>
</file>