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ahoma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ahoma" fo:font-size="12pt" style:font-size-asian="12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style:font-name="Tahoma" fo:font-size="12pt" style:font-size-asian="12pt" style:font-size-complex="12pt"/>
    </style:style>
    <style:style style:name="P5" style:family="paragraph" style:parent-style-name="Text_20_body">
      <style:text-properties style:font-name="Tahoma" fo:font-size="12pt" style:font-size-asian="12pt" style:font-size-complex="12pt"/>
    </style:style>
    <style:style style:name="P6" style:family="paragraph" style:parent-style-name="Text_20_body" style:list-style-name="L7">
      <style:text-properties style:font-name="Tahoma" fo:font-size="12pt" style:font-size-asian="12pt" style:font-size-complex="12pt"/>
    </style:style>
    <style:style style:name="P7" style:family="paragraph" style:parent-style-name="Text_20_body" style:list-style-name="L8">
      <style:text-properties style:font-name="Tahoma" fo:font-size="12pt" style:font-size-asian="12pt" style:font-size-complex="12pt"/>
    </style:style>
    <style:style style:name="P8" style:family="paragraph" style:parent-style-name="Text_20_body" style:list-style-name="L10">
      <style:text-properties style:font-name="Tahoma" fo:font-size="12pt" style:font-size-asian="12pt" style:font-size-complex="12pt"/>
    </style:style>
    <style:style style:name="P9" style:family="paragraph" style:parent-style-name="Text_20_body" style:list-style-name="L11">
      <style:text-properties style:font-name="Tahoma" fo:font-size="12pt" style:font-size-asian="12pt" style:font-size-complex="12pt"/>
    </style:style>
    <style:style style:name="P10" style:family="paragraph" style:parent-style-name="Text_20_body" style:list-style-name="L12">
      <style:text-properties style:font-name="Tahoma" fo:font-size="12pt" style:font-size-asian="12pt" style:font-size-complex="12pt"/>
    </style:style>
    <style:style style:name="P11" style:family="paragraph" style:parent-style-name="Text_20_body" style:list-style-name="L13">
      <style:text-properties style:font-name="Tahoma" fo:font-size="12pt" style:font-size-asian="12pt" style:font-size-complex="12pt"/>
    </style:style>
    <style:style style:name="P12" style:family="paragraph" style:parent-style-name="Text_20_body" style:list-style-name="L14">
      <style:text-properties style:font-name="Tahoma" fo:font-size="12pt" style:font-size-asian="12pt" style:font-size-complex="12pt"/>
    </style:style>
    <style:style style:name="P13" style:family="paragraph" style:parent-style-name="Text_20_body" style:list-style-name="L15">
      <style:text-properties style:font-name="Tahoma" fo:font-size="12pt" style:font-size-asian="12pt" style:font-size-complex="12pt"/>
    </style:style>
    <style:style style:name="P14" style:family="paragraph" style:parent-style-name="Text_20_body" style:list-style-name="L16">
      <style:text-properties style:font-name="Tahoma" fo:font-size="12pt" style:font-size-asian="12pt" style:font-size-complex="12pt"/>
    </style:style>
    <style:style style:name="P15" style:family="paragraph" style:parent-style-name="Text_20_body" style:list-style-name="L17">
      <style:text-properties style:font-name="Tahoma" fo:font-size="12pt" style:font-size-asian="12pt" style:font-size-complex="12pt"/>
    </style:style>
    <style:style style:name="P16" style:family="paragraph" style:parent-style-name="Text_20_body" style:list-style-name="L18">
      <style:text-properties style:font-name="Tahoma" fo:font-size="12pt" style:font-size-asian="12pt" style:font-size-complex="12pt"/>
    </style:style>
    <style:style style:name="P17" style:family="paragraph" style:parent-style-name="Text_20_body" style:list-style-name="L19">
      <style:text-properties style:font-name="Tahoma" fo:font-size="12pt" style:font-size-asian="12pt" style:font-size-complex="12pt"/>
    </style:style>
    <style:style style:name="P18" style:family="paragraph" style:parent-style-name="Text_20_body" style:list-style-name="L20">
      <style:text-properties style:font-name="Tahoma" fo:font-size="12pt" style:font-size-asian="12pt" style:font-size-complex="12pt"/>
    </style:style>
    <style:style style:name="P19" style:family="paragraph" style:parent-style-name="Text_20_body" style:list-style-name="L12">
      <style:text-properties style:font-name="Tahoma" fo:font-size="6pt" style:font-size-asian="6pt" style:font-size-complex="6pt"/>
    </style:style>
    <style:style style:name="P20" style:family="paragraph" style:parent-style-name="Text_20_body" style:list-style-name="L9"/>
    <style:style style:name="P21" style:family="paragraph" style:parent-style-name="Text_20_body">
      <style:paragraph-properties fo:margin-top="0cm" fo:margin-bottom="0cm"/>
      <style:text-properties style:font-name="Tahoma" fo:font-size="12pt" style:font-size-asian="12pt" style:font-size-complex="12pt"/>
    </style:style>
    <style:style style:name="P22" style:family="paragraph" style:parent-style-name="Text_20_body" style:list-style-name="L7">
      <style:paragraph-properties fo:margin-top="0cm" fo:margin-bottom="0cm"/>
      <style:text-properties style:font-name="Tahoma" fo:font-size="12pt" style:font-size-asian="12pt" style:font-size-complex="12pt"/>
    </style:style>
    <style:style style:name="P23" style:family="paragraph" style:parent-style-name="Text_20_body" style:list-style-name="L8">
      <style:paragraph-properties fo:margin-top="0cm" fo:margin-bottom="0cm"/>
      <style:text-properties style:font-name="Tahoma" fo:font-size="12pt" style:font-size-asian="12pt" style:font-size-complex="12pt"/>
    </style:style>
    <style:style style:name="P24" style:family="paragraph" style:parent-style-name="Text_20_body" style:list-style-name="L9">
      <style:paragraph-properties fo:margin-top="0cm" fo:margin-bottom="0cm"/>
      <style:text-properties style:font-name="Tahoma" fo:font-size="12pt" style:font-size-asian="12pt" style:font-size-complex="12pt"/>
    </style:style>
    <style:style style:name="P25" style:family="paragraph" style:parent-style-name="Text_20_body" style:list-style-name="L10">
      <style:paragraph-properties fo:margin-top="0cm" fo:margin-bottom="0cm"/>
      <style:text-properties style:font-name="Tahoma" fo:font-size="12pt" style:font-size-asian="12pt" style:font-size-complex="12pt"/>
    </style:style>
    <style:style style:name="P26" style:family="paragraph" style:parent-style-name="Text_20_body" style:list-style-name="L11">
      <style:paragraph-properties fo:margin-top="0cm" fo:margin-bottom="0cm"/>
      <style:text-properties style:font-name="Tahoma" fo:font-size="12pt" style:font-size-asian="12pt" style:font-size-complex="12pt"/>
    </style:style>
    <style:style style:name="P27" style:family="paragraph" style:parent-style-name="Text_20_body" style:list-style-name="L12">
      <style:paragraph-properties fo:margin-top="0cm" fo:margin-bottom="0cm"/>
      <style:text-properties style:font-name="Tahoma" fo:font-size="12pt" style:font-size-asian="12pt" style:font-size-complex="12pt"/>
    </style:style>
    <style:style style:name="P28" style:family="paragraph" style:parent-style-name="Text_20_body" style:list-style-name="L14">
      <style:paragraph-properties fo:margin-top="0cm" fo:margin-bottom="0cm"/>
      <style:text-properties style:font-name="Tahoma" fo:font-size="12pt" style:font-size-asian="12pt" style:font-size-complex="12pt"/>
    </style:style>
    <style:style style:name="P29" style:family="paragraph" style:parent-style-name="Text_20_body" style:list-style-name="L16">
      <style:paragraph-properties fo:margin-top="0cm" fo:margin-bottom="0cm"/>
      <style:text-properties style:font-name="Tahoma" fo:font-size="12pt" style:font-size-asian="12pt" style:font-size-complex="12pt"/>
    </style:style>
    <style:style style:name="P30" style:family="paragraph" style:parent-style-name="Text_20_body" style:list-style-name="L18">
      <style:paragraph-properties fo:margin-top="0cm" fo:margin-bottom="0cm"/>
      <style:text-properties style:font-name="Tahoma" fo:font-size="12pt" style:font-size-asian="12pt" style:font-size-complex="12pt"/>
    </style:style>
    <style:style style:name="P31" style:family="paragraph" style:parent-style-name="Text_20_body" style:list-style-name="L20">
      <style:paragraph-properties fo:margin-top="0cm" fo:margin-bottom="0cm"/>
      <style:text-properties style:font-name="Tahoma" fo:font-size="12pt" style:font-size-asian="12pt" style:font-size-complex="12pt"/>
    </style:style>
    <style:style style:name="P32" style:family="paragraph" style:parent-style-name="Text_20_body" style:list-style-name="L11">
      <style:paragraph-properties fo:margin-top="0cm" fo:margin-bottom="0cm"/>
      <style:text-properties style:font-name="Tahoma" fo:font-size="6pt" style:font-size-asian="6pt" style:font-size-complex="6pt"/>
    </style:style>
    <style:style style:name="T1" style:family="text">
      <style:text-properties style:font-name="Tahoma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2">UX Experience Questionnaire – Give the Duck a Qwacker</text:span></text:span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2">Tester Name:</text:span></text:span><text:span text:style-name="T2"> ______________________<text:line-break/></text:span><text:span text:style-name="Strong_20_Emphasis"><text:span text:style-name="T2">Date:</text:span></text:span><text:span text:style-name="T2"> ______________________</text:span></text:p>
      <text:p text:style-name="Text_20_body"><text:span text:style-name="T2"><text:line-break/></text:span><text:span text:style-name="Strong_20_Emphasis"><text:span text:style-name="T2">Instructions:</text:span></text:span><text:span text:style-name="T2"> This questionnaire is about your </text:span><text:span text:style-name="Strong_20_Emphasis"><text:span text:style-name="T2">experience</text:span></text:span><text:span text:style-name="T2"> while playing the game. Answer honestly — there are no right or wrong answers.</text:span></text:p>
      <text:h text:style-name="Heading_20_3" text:outline-level="3"><text:span text:style-name="Strong_20_Emphasis"><text:span text:style-name="T2">1. First Impressions</text:span></text:span></text:h>
      <text:list xml:id="list4184016384219689463" text:style-name="L8">
        <text:list-item>
          <text:p text:style-name="P23">How visually appealing did you find the game interface? </text:p>
          <text:list>
            <text:list-item>
              <text:p text:style-name="P23">☐ Very appealing </text:p>
            </text:list-item>
            <text:list-item>
              <text:p text:style-name="P23">☐ Somewhat appealing </text:p>
            </text:list-item>
            <text:list-item>
              <text:p text:style-name="P23">☐ Neutral </text:p>
            </text:list-item>
            <text:list-item>
              <text:p text:style-name="P23">☐ Not very appealing </text:p>
            </text:list-item>
            <text:list-item>
              <text:p text:style-name="P23">☐ Not appealing at all </text:p>
              <text:p text:style-name="P23"/>
            </text:list-item>
          </text:list>
        </text:list-item>
        <text:list-item>
          <text:p text:style-name="P23">Was it immediately clear what you were supposed to do in the game? </text:p>
          <text:list>
            <text:list-item>
              <text:p text:style-name="P23">☐ Very clear </text:p>
            </text:list-item>
            <text:list-item>
              <text:p text:style-name="P23">☐ Mostly clear </text:p>
            </text:list-item>
            <text:list-item>
              <text:p text:style-name="P23">☐ Neutral </text:p>
            </text:list-item>
            <text:list-item>
              <text:p text:style-name="P23">☐ Somewhat unclear </text:p>
            </text:list-item>
            <text:list-item>
              <text:p text:style-name="P7">☐ Very unclear </text:p>
            </text:list-item>
          </text:list>
        </text:list-item>
      </text:list>
      <text:h text:style-name="Heading_20_3" text:outline-level="3"><text:span text:style-name="Strong_20_Emphasis"><text:span text:style-name="T2">2. Navigation and Flow</text:span></text:span></text:h>
      <text:list xml:id="list3246745728756279396" text:style-name="L9">
        <text:list-item>
          <text:p text:style-name="P24">How easy was it to understand how to start and play the game? </text:p>
          <text:list>
            <text:list-item>
              <text:p text:style-name="P24">☐ Very easy </text:p>
            </text:list-item>
            <text:list-item>
              <text:p text:style-name="P24">☐ Easy </text:p>
            </text:list-item>
            <text:list-item>
              <text:p text:style-name="P24">☐ Neutral </text:p>
            </text:list-item>
            <text:list-item>
              <text:p text:style-name="P24">☐ Difficult </text:p>
            </text:list-item>
            <text:list-item>
              <text:p text:style-name="P24">☐ Very difficult </text:p>
              <text:p text:style-name="P24"/>
            </text:list-item>
          </text:list>
        </text:list-item>
        <text:list-item>
          <text:p text:style-name="P24">Did the sequence of questions feel smooth and logical? </text:p>
          <text:list>
            <text:list-item>
              <text:p text:style-name="P24">☐ Very smooth </text:p>
            </text:list-item>
            <text:list-item>
              <text:p text:style-name="P24">☐ Mostly smooth </text:p>
            </text:list-item>
            <text:list-item>
              <text:p text:style-name="P24">☐ Neutral </text:p>
            </text:list-item>
            <text:list-item>
              <text:p text:style-name="P24">☐ Slightly confusing </text:p>
            </text:list-item>
            <text:list-item>
              <text:p text:style-name="P24">☐ Very confusing </text:p>
            </text:list-item>
            <text:list-item>
              <text:p text:style-name="P24"/>
            </text:list-item>
          </text:list>
        </text:list-item>
        <text:list-item>
          <text:p text:style-name="P24">Did the game provide clear guidance when you answered correctly or incorrectly? </text:p>
          <text:list>
            <text:list-item>
              <text:p text:style-name="P24">☐ Always </text:p>
            </text:list-item>
            <text:list-item>
              <text:p text:style-name="P24">☐ Mostly </text:p>
            </text:list-item>
            <text:list-item>
              <text:p text:style-name="P24">☐ Sometimes </text:p>
            </text:list-item>
            <text:list-item>
              <text:p text:style-name="P24">☐ Rarely </text:p>
            </text:list-item>
            <text:list-item>
              <text:p text:style-name="P20"><text:span text:style-name="T2">☐ Never </text:span></text:p>
            </text:list-item>
          </text:list>
        </text:list-item>
      </text:list>
      <text:h text:style-name="Heading_20_3" text:outline-level="3"><text:soft-page-break/><text:span text:style-name="Strong_20_Emphasis"><text:span text:style-name="T2">3. Feedback and Responsiveness</text:span></text:span></text:h>
      <text:list xml:id="list3064073811769910458" text:style-name="L10">
        <text:list-item>
          <text:p text:style-name="P25">Did the messages “Correct! Feed your Duck” or “Wrong! Try again” help you understand your performance? </text:p>
          <text:list>
            <text:list-item>
              <text:p text:style-name="P25">☐ Very helpful </text:p>
            </text:list-item>
            <text:list-item>
              <text:p text:style-name="P25">☐ Mostly helpful </text:p>
            </text:list-item>
            <text:list-item>
              <text:p text:style-name="P25">☐ Neutral </text:p>
            </text:list-item>
            <text:list-item>
              <text:p text:style-name="P25">☐ Not very helpful </text:p>
            </text:list-item>
            <text:list-item>
              <text:p text:style-name="P25">☐ Confusing </text:p>
              <text:p text:style-name="P25"/>
            </text:list-item>
          </text:list>
        </text:list-item>
        <text:list-item>
          <text:p text:style-name="P25">Did the duck and cracker animations help you understand progress and reward? </text:p>
          <text:list>
            <text:list-item>
              <text:p text:style-name="P25">☐ Very helpful </text:p>
            </text:list-item>
            <text:list-item>
              <text:p text:style-name="P25">☐ Somewhat helpful </text:p>
            </text:list-item>
            <text:list-item>
              <text:p text:style-name="P25">☐ Neutral </text:p>
            </text:list-item>
            <text:list-item>
              <text:p text:style-name="P25">☐ Not very helpful </text:p>
            </text:list-item>
            <text:list-item>
              <text:p text:style-name="P25">☐ Distracting </text:p>
              <text:p text:style-name="P25"/>
            </text:list-item>
          </text:list>
        </text:list-item>
        <text:list-item>
          <text:p text:style-name="P25">Did the sounds (correct/wrong/you win/you lose) enhance your experience? </text:p>
          <text:list>
            <text:list-item>
              <text:p text:style-name="P25">☐ Strongly enhanced </text:p>
            </text:list-item>
            <text:list-item>
              <text:p text:style-name="P25">☐ Somewhat enhanced </text:p>
            </text:list-item>
            <text:list-item>
              <text:p text:style-name="P25">☐ Neutral </text:p>
            </text:list-item>
            <text:list-item>
              <text:p text:style-name="P25">☐ Slightly annoying </text:p>
            </text:list-item>
            <text:list-item>
              <text:p text:style-name="P8">☐ Very annoying </text:p>
            </text:list-item>
          </text:list>
        </text:list-item>
      </text:list>
      <text:h text:style-name="Heading_20_3" text:outline-level="3"><text:span text:style-name="Strong_20_Emphasis"><text:span text:style-name="T2">4. Challenge and Engagement</text:span></text:span></text:h>
      <text:list xml:id="list1800725688885231222" text:style-name="L11">
        <text:list-item>
          <text:p text:style-name="P26">Did the timer create an appropriate level of excitement or challenge? </text:p>
          <text:p text:style-name="P32"/>
          <text:list>
            <text:list-item>
              <text:p text:style-name="P26">☐ Too exciting / intense </text:p>
            </text:list-item>
            <text:list-item>
              <text:p text:style-name="P26">☐ Just right </text:p>
            </text:list-item>
            <text:list-item>
              <text:p text:style-name="P26">☐ Slightly boring </text:p>
            </text:list-item>
            <text:list-item>
              <text:p text:style-name="P26">☐ Too boring </text:p>
              <text:p text:style-name="P26"/>
            </text:list-item>
          </text:list>
        </text:list-item>
        <text:list-item>
          <text:p text:style-name="P9">Were the questions the right difficulty level for you? </text:p>
        </text:list-item>
      </text:list>
      <text:list xml:id="list3358259290404207724" text:style-name="L12">
        <text:list-item>
          <text:p text:style-name="P27">☐ Too easy </text:p>
        </text:list-item>
        <text:list-item>
          <text:p text:style-name="P27">☐ Just right </text:p>
        </text:list-item>
        <text:list-item>
          <text:p text:style-name="P27">☐ Slightly hard </text:p>
        </text:list-item>
        <text:list-item>
          <text:p text:style-name="P10">☐ Too hard </text:p>
        </text:list-item>
        <text:list-item>
          <text:p text:style-name="P19"/>
        </text:list-item>
      </text:list>
      <text:list xml:id="list910273109889956171" text:style-name="L13">
        <text:list-item>
          <text:p text:style-name="P11">Did you feel motivated to keep playing until the end? </text:p>
        </text:list-item>
      </text:list>
      <text:list xml:id="list4573581453726256425" text:style-name="L14">
        <text:list-item>
          <text:p text:style-name="P28">☐ Very motivated </text:p>
        </text:list-item>
        <text:list-item>
          <text:p text:style-name="P28">☐ Motivated </text:p>
        </text:list-item>
        <text:list-item>
          <text:p text:style-name="P28">☐ Neutral </text:p>
        </text:list-item>
        <text:list-item>
          <text:p text:style-name="P28">☐ Slightly unmotivated </text:p>
        </text:list-item>
        <text:list-item>
          <text:p text:style-name="P12">☐ Not motivated at all</text:p>
          <text:p text:style-name="P12"/>
          <text:p text:style-name="P12"><text:s/></text:p>
        </text:list-item>
      </text:list>
      <text:h text:style-name="Heading_20_3" text:outline-level="3"><text:soft-page-break/><text:span text:style-name="Strong_20_Emphasis"><text:span text:style-name="T2">5. Overall Experience</text:span></text:span></text:h>
      <text:list xml:id="list6568180068763117726" text:style-name="L15">
        <text:list-item>
          <text:p text:style-name="P13">Did the game make sense as a whole (interface, instructions, feedback, and goal)? </text:p>
        </text:list-item>
      </text:list>
      <text:list xml:id="list79449285679418634" text:style-name="L16">
        <text:list-item>
          <text:p text:style-name="P29">☐ Perfectly clear </text:p>
        </text:list-item>
        <text:list-item>
          <text:p text:style-name="P29">☐ Mostly clear </text:p>
        </text:list-item>
        <text:list-item>
          <text:p text:style-name="P29">☐ Neutral </text:p>
        </text:list-item>
        <text:list-item>
          <text:p text:style-name="P29">☐ Slightly unclear </text:p>
        </text:list-item>
        <text:list-item>
          <text:p text:style-name="P14">☐ Very unclear </text:p>
          <text:p text:style-name="P14"/>
        </text:list-item>
      </text:list>
      <text:list xml:id="list3350707304961287801" text:style-name="L17">
        <text:list-item>
          <text:p text:style-name="P15">How would you describe your overall enjoyment? </text:p>
        </text:list-item>
      </text:list>
      <text:list xml:id="list1176884046684449487" text:style-name="L18">
        <text:list-item>
          <text:p text:style-name="P30">☐ Loved it </text:p>
        </text:list-item>
        <text:list-item>
          <text:p text:style-name="P30">☐ Liked it </text:p>
        </text:list-item>
        <text:list-item>
          <text:p text:style-name="P30">☐ Neutral </text:p>
        </text:list-item>
        <text:list-item>
          <text:p text:style-name="P30">☐ Didn’t like it </text:p>
        </text:list-item>
        <text:list-item>
          <text:p text:style-name="P16">☐ Hated it </text:p>
          <text:p text:style-name="P16"/>
        </text:list-item>
      </text:list>
      <text:list xml:id="list7017525067192960972" text:style-name="L19">
        <text:list-item>
          <text:p text:style-name="P17">Would you play this game again? </text:p>
        </text:list-item>
      </text:list>
      <text:list xml:id="list7781247655745481844" text:style-name="L20">
        <text:list-item>
          <text:p text:style-name="P31">☐ Definitely </text:p>
        </text:list-item>
        <text:list-item>
          <text:p text:style-name="P31">☐ Probably </text:p>
        </text:list-item>
        <text:list-item>
          <text:p text:style-name="P31">☐ Not sure </text:p>
        </text:list-item>
        <text:list-item>
          <text:p text:style-name="P31">☐ Probably not </text:p>
        </text:list-item>
        <text:list-item>
          <text:p text:style-name="P18">☐ Definitely not 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Optional questions:</text:span></text:span></text:p>
      <text:list xml:id="list5814718907083848098" text:style-name="L7">
        <text:list-item>
          <text:p text:style-name="P22">What did you enjoy most about the game? </text:p>
        </text:list-item>
      </text:list>
      <text:p text:style-name="P21"/>
      <text:p text:style-name="P21"/>
      <text:p text:style-name="P21"/>
      <text:p text:style-name="P21"/>
      <text:list xml:id="list40428108" text:continue-numbering="true" text:style-name="L7">
        <text:list-item>
          <text:p text:style-name="P22">What did you find frustrating or confusing? </text:p>
        </text:list-item>
      </text:list>
      <text:p text:style-name="P21"/>
      <text:p text:style-name="P21"/>
      <text:p text:style-name="P21"/>
      <text:p text:style-name="P21"/>
      <text:list xml:id="list40410574" text:continue-numbering="true" text:style-name="L7">
        <text:list-item>
          <text:p text:style-name="P6">How could the overall experience be improved?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 </meta:initial-creator>
    <meta:creation-date>2026-05-14T14:17:38.66</meta:creation-date>
    <meta:document-statistic meta:table-count="0" meta:image-count="0" meta:object-count="0" meta:page-count="3" meta:paragraph-count="95" meta:word-count="504" meta:character-count="2536"/>
    <dc:date>2026-05-14T20:14:49</dc:date>
    <dc:creator>Dee </dc:creator>
    <meta:editing-duration>PT57S</meta:editing-duration>
    <meta:editing-cycles>1</meta:editing-cycles>
    <meta:generator>OpenOffice/4.1.15$Win32 OpenOffice.org_project/4115m2$Build-9813</meta:generator>
  </office:meta>
</office:document-meta>
</file>